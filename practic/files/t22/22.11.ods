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ID процесса B</text:p>
          </table:table-cell>
          <table:table-cell office:value-type="string" table:style-name="ce2">
            <text:p>Время выполнения процесса B (мс)</text:p>
          </table:table-cell>
          <table:table-cell office:value-type="string" table:style-name="ce2">
            <text:p>ID процесса (ов) A</text:p>
          </table:table-cell>
          <table:table-cell table:number-columns-repeated="16381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;3</text:p>
          </table:table-cell>
          <table:table-cell table:number-columns-repeated="16381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2;4</text:p>
          </table:table-cell>
          <table:table-cell table:number-columns-repeated="16381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3;4</text:p>
          </table:table-cell>
          <table:table-cell table:number-columns-repeated="16381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14" table:style-name="ce1">
            <text:p>14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7;8</text:p>
          </table:table-cell>
          <table:table-cell table:number-columns-repeated="16381"/>
        </table:table-row>
        <table:table-row table:style-name="ro2"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7;9</text:p>
          </table:table-cell>
          <table:table-cell table:number-columns-repeated="16381"/>
        </table:table-row>
        <table:table-row table:number-rows-repeated="104856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4</meta:generator>
    <meta:initial-creator>Георгий</meta:initial-creator>
    <dc:creator>Валентина Котельникова</dc:creator>
    <meta:creation-date>2022-09-24T21:01:05Z</meta:creation-date>
    <dc:date>2025-10-03T06:52:05Z</dc:date>
  </office:meta>
</office:document-meta>
</file>