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 (ов) A</text:p>
          </table:table-cell>
          <table:table-cell table:number-columns-repeated="1638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1;2</text:p>
          </table:table-cell>
          <table:table-cell table:number-columns-repeated="1638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;4</text:p>
          </table:table-cell>
          <table:table-cell table:number-columns-repeated="1638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2;7</text:p>
          </table:table-cell>
          <table:table-cell table:number-columns-repeated="1638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4;6</text:p>
          </table:table-cell>
          <table:table-cell table:number-columns-repeated="16381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Георгий</meta:initial-creator>
    <dc:creator>Валентина Котельникова</dc:creator>
    <meta:creation-date>2022-09-24T20:01:19Z</meta:creation-date>
    <dc:date>2025-10-02T08:51:27Z</dc:date>
  </office:meta>
</office:document-meta>
</file>